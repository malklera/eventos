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077ed5"/>
    </style:style>
    <style:style style:name="T2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0f4bdd6-7fff-1a3d-40f5-477f6a893881"/>Busca tu foto y ve el número del archivo; tu video tiene el mismo número.</text:p>
      <text:p text:style-name="P2"/>
      <text:p text:style-name="P1">La carpeta "Editados" contiene los videos editados por Mimbi.</text:p>
      <text:p text:style-name="P2"/>
      <text:p text:style-name="P1">Se recomienda descargar el video.</text:p>
      <text:p text:style-name="P2"/>
      <text:p text:style-name="P1">Los videos estarán disponibles hasta el <text:span text:style-name="T1">DATE</text:span> inclusive. Luego serán eliminados.</text:p>
      <text:p text:style-name="P2"/>
      <text:p text:style-name="P1">Si no encuentras tu video, contacta con:</text:p>
      <text:p text:style-name="P2"/>
      <text:p text:style-name="P1">Instagram: @mimbi_glitterbar</text:p>
      <text:p text:style-name="P2"/>
      <text:p text:style-name="P1">WhatsApp: 3435362802</text:p>
      <text:p text:style-name="P2"><text:span text:style-name="T2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9T21:55:55.771860931</meta:creation-date>
    <dc:date>2026-06-19T21:57:00.683353830</dc:date>
    <meta:editing-duration>PT1M5S</meta:editing-duration>
    <meta:editing-cycles>1</meta:editing-cycles>
    <meta:document-statistic meta:table-count="0" meta:image-count="0" meta:object-count="0" meta:page-count="1" meta:paragraph-count="8" meta:word-count="51" meta:character-count="335" meta:non-whitespace-character-count="290"/>
    <meta:generator>LibreOffice/25.8.7.3$Linux_X86_64 LibreOffice_project/580$Build-3</meta:generator>
  </office:meta>
</office:document-meta>
</file>